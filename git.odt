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B0000039A5BE36457.png" manifest:media-type="image/png"/>
  <manifest:file-entry manifest:full-path="Pictures/10000001000001FD000002869A175E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/>
      <style:text-properties fo:font-size="16pt" officeooo:rsid="0015bddb" officeooo:paragraph-rsid="0015bddb" style:font-size-asian="14pt" style:font-size-complex="16pt"/>
    </style:style>
    <style:style style:name="P2" style:family="paragraph" style:parent-style-name="Standard">
      <style:paragraph-properties fo:text-align="left" style:justify-single-word="false"/>
      <style:text-properties officeooo:paragraph-rsid="0016d080"/>
    </style:style>
    <style:style style:name="P3" style:family="paragraph" style:parent-style-name="Standard">
      <style:paragraph-properties fo:text-align="left" style:justify-single-word="false"/>
      <style:text-properties fo:font-size="16pt" officeooo:rsid="0015e620" officeooo:paragraph-rsid="0016d080" style:font-size-asian="14pt" style:font-size-complex="16pt"/>
    </style:style>
    <style:style style:name="P4" style:family="paragraph" style:parent-style-name="Standard">
      <style:paragraph-properties fo:margin-top="0in" fo:margin-bottom="0.1965in" style:contextual-spacing="false" fo:text-align="left" style:justify-single-word="false"/>
      <style:text-properties fo:font-size="16pt" officeooo:rsid="0015e620" officeooo:paragraph-rsid="0016d080" style:font-size-asian="14pt" style:font-size-complex="16pt"/>
    </style:style>
    <style:style style:name="P5" style:family="paragraph" style:parent-style-name="Standard">
      <style:paragraph-properties fo:text-align="left" style:justify-single-word="false"/>
      <style:text-properties fo:font-size="16pt" style:text-underline-style="solid" style:text-underline-type="double" style:text-underline-width="auto" style:text-underline-color="font-color" officeooo:rsid="00208a77" officeooo:paragraph-rsid="00208a77" style:font-size-asian="14pt" style:font-size-complex="16pt"/>
    </style:style>
    <style:style style:name="T1" style:family="text">
      <style:text-properties officeooo:rsid="0015e620"/>
    </style:style>
    <style:style style:name="T2" style:family="text">
      <style:text-properties fo:font-size="16pt" officeooo:rsid="0015e620" style:font-size-asian="14pt" style:font-size-complex="16pt"/>
    </style:style>
    <style:style style:name="T3" style:family="text">
      <style:text-properties fo:font-size="16pt" officeooo:rsid="0015bddb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control</text:p>
      <text:p text:style-name="P1"/>
      <text:p text:style-name="P1"><text:span text:style-name="T1">T</text:span>ypes of <text:span text:style-name="T1">v</text:span>ersion control</text:p>
      <text:p text:style-name="P1"/>
      <text:p text:style-name="P1"><text:span text:style-name="T1">C</text:span>entralised</text:p>
      <text:p text:style-name="P2"><text:span text:style-name="T2">D</text:span><text:span text:style-name="T3">istr</text:span><text:span text:style-name="T2">ibuted</text:span></text:p>
      <text:p text:style-name="P3"/>
      <text:p text:style-name="P3"><draw:frame draw:style-name="fr1" draw:name="Image1" text:anchor-type="char" svg:x="0.0098in" svg:y="0.0646in" svg:width="5.3016in" svg:height="6.728in" draw:z-index="0"><draw:image xlink:href="Pictures/10000001000001FD000002869A175E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0209in" svg:y="-0.0571in" svg:width="6.9252in" svg:height="6.0744in" draw:z-index="1"><draw:image xlink:href="Pictures/100000010000041B0000039A5BE36457.png" xlink:type="simple" xlink:show="embed" xlink:actuate="onLoad" draw:mime-type="image/png"/></draw:frame><text:soft-pag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Heading_20_1" text:outline-level="1"><text:soft-page-break/></text:h>
      <text:h text:style-name="Heading_20_1" text:outline-level="1">STEP 1 - Go to the project</text:h>
      <text:h text:style-name="Heading_20_1" text:outline-level="1"/>
      <text:p text:style-name="Text_20_body">cd ~/Desktop/Batch_11/Project_Dhrundhar</text:p>
      <text:h text:style-name="Heading_20_1" text:outline-level="1"/>
      <text:h text:style-name="Heading_20_1" text:outline-level="1">STEP 2 - Create Development Branch</text:h>
      <text:h text:style-name="Heading_20_1" text:outline-level="1"/>
      <text:p text:style-name="Text_20_body">git branch development git branch</text:p>
      <text:p text:style-name="Text_20_body">git switch development</text:p>
      <text:h text:style-name="Heading_20_1" text:outline-level="1"><text:soft-page-break/>OR</text:h>
      <text:h text:style-name="Heading_20_1" text:outline-level="1">git checkout development</text:h>
      <text:h text:style-name="Heading_20_1" text:outline-level="1"/>
      <text:h text:style-name="Heading_20_1" text:outline-level="1">STEP 3 - Create files on Development branch</text:h>
      <text:h text:style-name="Heading_20_1" text:outline-level="1"/>
      <text:h text:style-name="Heading_20_1" text:outline-level="1">Create:</text:h>
      <text:h text:style-name="Heading_20_1" text:outline-level="1">ingress.yml</text:h>
      <text:h text:style-name="Heading_20_1" text:outline-level="1">dev.yml</text:h>
      <text:h text:style-name="Heading_20_1" text:outline-level="1">Add some sample content in both files</text:h>
      <text:h text:style-name="Heading_20_1" text:outline-level="1"/>
      <text:h text:style-name="Heading_20_1" text:outline-level="1">STEP 4 - Commit changes on Development branch</text:h>
      <text:h text:style-name="Heading_20_1" text:outline-level="1"/>
      <text:p text:style-name="Text_20_body">git status git log --oneline</text:p>
      <text:p text:style-name="Text_20_body">git add .</text:p>
      <text:p text:style-name="Text_20_body">git commit -m "development variables added"</text:p>
      <text:p text:style-name="Text_20_body">git status git log --oneline</text:p>
      <text:h text:style-name="Heading_20_1" text:outline-level="1"/>
      <text:h text:style-name="Heading_20_1" text:outline-level="1">STEP 5 - Switch between branches (Practice)</text:h>
      <text:h text:style-name="Heading_20_1" text:outline-level="1"/>
      <text:p text:style-name="Text_20_body">git switch main git switch development</text:p>
      <text:h text:style-name="Heading_20_1" text:outline-level="1"><text:soft-page-break/>OR</text:h>
      <text:p text:style-name="Text_20_body">git checkout main git checkout development</text:p>
      <text:p text:style-name="Text_20_body">git checkout main</text:p>
      <text:h text:style-name="Heading_20_1" text:outline-level="1"/>
      <text:h text:style-name="Heading_20_1" text:outline-level="1">STEP 6 - Create QA branch</text:h>
      <text:h text:style-name="Heading_20_1" text:outline-level="1"/>
      <text:p text:style-name="Text_20_body">git checkout -b qa</text:p>
      <text:h text:style-name="Heading_20_1" text:outline-level="1"><text:soft-page-break/>OR</text:h>
      <text:h text:style-name="Heading_20_1" text:outline-level="1">git branch qa</text:h>
      <text:h text:style-name="Heading_20_1" text:outline-level="1">git switch qa</text:h>
      <text:h text:style-name="Heading_20_1" text:outline-level="1"/>
      <text:h text:style-name="Heading_20_1" text:outline-level="1">STEP 7 - Create qa.yml</text:h>
      <text:h text:style-name="Heading_20_1" text:outline-level="1"/>
      <text:h text:style-name="Heading_20_1" text:outline-level="1">Create:</text:h>
      <text:h text:style-name="Heading_20_1" text:outline-level="1">qa.yml</text:h>
      <text:h text:style-name="Heading_20_1" text:outline-level="1">Add some sample content</text:h>
      <text:h text:style-name="Heading_20_1" text:outline-level="1"/>
      <text:h text:style-name="Heading_20_1" text:outline-level="1">STEP 8 - Commit QA changes</text:h>
      <text:h text:style-name="Heading_20_1" text:outline-level="1"/>
      <text:p text:style-name="Text_20_body">git status</text:p>
      <text:p text:style-name="Text_20_body">git add .</text:p>
      <text:p text:style-name="Text_20_body">git commit -m "testing variables added"</text:p>
      <text:p text:style-name="Text_20_body">git branch git branch -r</text:p>
      <text:h text:style-name="Heading_20_1" text:outline-level="1"/>
      <text:h text:style-name="Heading_20_1" text:outline-level="1">STEP 9 - Push QA branch</text:h>
      <text:h text:style-name="Heading_20_1" text:outline-level="1"/>
      <text:p text:style-name="Text_20_body">git push -u origin qa</text:p>
      <text:h text:style-name="Heading_20_1" text:outline-level="1"><text:soft-page-break/></text:h>
      <text:h text:style-name="Heading_20_1" text:outline-level="1">STEP 10 - Switch back to Main</text:h>
      <text:h text:style-name="Heading_20_1" text:outline-level="1"/>
      <text:p text:style-name="Text_20_body">git checkout main</text:p>
      <text:h text:style-name="Heading_20_1" text:outline-level="1">Edit:</text:h>
      <text:h text:style-name="Heading_20_1" text:outline-level="1">pod.yml</text:h>
      <text:h text:style-name="Heading_20_1" text:outline-level="1">service.yml</text:h>
      <text:h text:style-name="Heading_20_1" text:outline-level="1">Add some sample content</text:h>
      <text:h text:style-name="Heading_20_1" text:outline-level="1"/>
      <text:h text:style-name="Heading_20_1" text:outline-level="1">STEP 11 - Commit Main branch changes</text:h>
      <text:h text:style-name="Heading_20_1" text:outline-level="1"/>
      <text:p text:style-name="Text_20_body">git status</text:p>
      <text:p text:style-name="Text_20_body">git add .</text:p>
      <text:p text:style-name="Text_20_body">git commit -m "changes in pod.yml and service.yml"</text:p>
      <text:p text:style-name="Text_20_body">git status</text:p>
      <text:h text:style-name="Heading_20_1" text:outline-level="1"/>
      <text:h text:style-name="Heading_20_1" text:outline-level="1">STEP 12 - Push Main</text:h>
      <text:h text:style-name="Heading_20_1" text:outline-level="1"/>
      <text:p text:style-name="Text_20_body">git push origin main</text:p>
      <text:h text:style-name="Heading_20_1" text:outline-level="1"><text:soft-page-break/></text:h>
      <text:h text:style-name="Heading_20_1" text:outline-level="1">STEP 13 - Push Development branch</text:h>
      <text:h text:style-name="Heading_20_1" text:outline-level="1"/>
      <text:p text:style-name="Text_20_body">git checkout development</text:p>
      <text:p text:style-name="Text_20_body">git push origin development</text:p>
      <text:h text:style-name="Heading_20_1" text:outline-level="1">If Git says there is no upstream branch:</text:h>
      <text:p text:style-name="Text_20_body">git push -u origin development</text:p>
      <text:h text:style-name="Heading_20_1" text:outline-level="1"/>
      <text:h text:style-name="Heading_20_1" text:outline-level="1">STEP 14 - Switch to QA</text:h>
      <text:h text:style-name="Heading_20_1" text:outline-level="1"/>
      <text:p text:style-name="Text_20_body">git checkout qa</text:p>
      <text:p text:style-name="Text_20_body">git status git branch</text:p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git flow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08:03:43.779190351</meta:creation-date>
    <dc:date>2026-07-12T10:16:54.567742180</dc:date>
    <meta:editing-duration>PT1H57M3S</meta:editing-duration>
    <meta:editing-cycles>6</meta:editing-cycles>
    <meta:generator>LibreOffice/26.2.4.2$Linux_X86_64 LibreOffice_project/620$Build-2</meta:generator>
    <meta:document-statistic meta:table-count="0" meta:image-count="2" meta:object-count="0" meta:page-count="10" meta:paragraph-count="65" meta:word-count="255" meta:character-count="1390" meta:non-whitespace-character-count="1199"/>
  </office:meta>
</office:document-meta>
</file>